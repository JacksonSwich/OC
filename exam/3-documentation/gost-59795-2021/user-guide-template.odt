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TitleMain" style:family="paragraph" style:display-name="TitleMain">
      <style:paragraph-properties fo:text-align="center"/>
      <style:text-properties fo:font-size="16pt" style:font-name="Times New Roman" fo:font-weight="bold"/>
    </style:style>
    <style:style style:name="Heading1" style:family="paragraph" style:parent-style-name="Heading" style:display-name="Heading1">
      <style:paragraph-properties fo:text-align="left"/>
      <style:text-properties fo:font-size="14pt" style:font-name="Times New Roman" fo:font-weight="bold"/>
    </style:style>
    <style:style style:name="Heading2" style:family="paragraph" style:parent-style-name="Heading" style:display-name="Heading2">
      <style:paragraph-properties fo:text-align="left"/>
      <style:text-properties fo:font-size="14pt" style:font-name="Times New Roman" fo:font-weight="bold" fo:font-style="italic"/>
    </style:style>
    <style:style style:name="CodeBlock" style:family="paragraph" style:display-name="CodeBlock">
      <style:paragraph-properties fo:margin-left="10mm"/>
      <style:text-properties fo:font-size="11pt" style:font-name="Courier New"/>
    </style:style>
    <style:style style:name="ListItem" style:family="paragraph" style:display-name="ListItem">
      <style:paragraph-properties fo:margin-left="10mm"/>
      <style:text-properties fo:font-size="14pt" style:font-name="Times New Roman"/>
    </style:style>
    <style:style style:name="BoldSpan" style:family="text" style:display-name="BoldSpan">
      <style:text-properties fo:font-weight="bold"/>
    </style:style>
  </office:automatic-styles>
  <office:body>
    <office:text>
      <text:p text:style-name="BodyText"/>
      <text:p text:style-name="BodyText"/>
      <text:p text:style-name="BodyText"/>
      <text:p text:style-name="BodyText"/>
      <text:p text:style-name="BodyText"/>
      <text:p text:style-name="TitleMain">РУКОВОДСТВО ПОЛЬЗОВАТЕЛЯ</text:p>
      <text:p text:style-name="BodyText"/>
      <text:p text:style-name="BodyText"/>
      <text:p text:style-name="BodyText"/>
      <text:p text:style-name="BodyText"/>
      <text:p text:style-name="BodyText"/>
      <text:p text:style-name="TitleMain"><text:span text:style-name="BoldSpan">Средство автоматизации: [Название ПО]</text:span></text:p>
      <text:p text:style-name="BodyText"/>
      <text:p text:style-name="BodyText">Операционная система: Linux (Ubuntu 22.04+) / Windows 10+</text:p>
      <text:p text:style-name="BodyText">Дата составления: _______________</text:p>
      <text:p text:style-name="BodyText"/>
      <text:p text:style-name="BodyText"/>
      <text:p text:style-name="BodyText"/>
      <text:p text:style-name="Heading1">1. Введение</text:p>
      <text:p text:style-name="BodyText"/>
      <text:p text:style-name="Heading2">1.1 Область применения</text:p>
      <text:p text:style-name="BodyText">Настоящий документ является руководством пользователя для работы со средством автоматизации «[Название ПО]».</text:p>
      <text:p text:style-name="BodyText">Данное программное обеспечение предназначено для __________________________________________________________________</text:p>
      <text:p text:style-name="BodyText">Руководство предназначено для пользователей, выполняющих _____________________________________________________</text:p>
      <text:p text:style-name="BodyText"/>
      <text:p text:style-name="Heading2">1.2 Уровень подготовки пользователя</text:p>
      <text:p text:style-name="BodyText">Пользователь должен обладать базовыми навыками работы в операционной системе (терминал Linux / командная строка Windows), а также понимать основные принципы ________________________________________</text:p>
      <text:p text:style-name="BodyText">Для работы в Linux требуется уверенное использование терминала и пакетного менеджера. Для работы в Windows — умение устанавливать приложения и работать с проводником.</text:p>
      <text:p text:style-name="BodyText"/>
      <text:p text:style-name="Heading2">1.3 Перечень эксплуатационной документации</text:p>
      <text:p text:style-name="BodyText">Для успешного использования средства автоматизации рекомендуется ознакомиться со следующей документацией:</text:p>
      <text:p text:style-name="ListItem">•  официальная документация «[Название ПО]» (доступна на сайте разработчика)</text:p>
      <text:p text:style-name="ListItem">•  системные требования и инструкция по установке</text:p>
      <text:p text:style-name="ListItem">•  настоящий документ</text:p>
      <text:p text:style-name="BodyText"/>
      <text:p text:style-name="Heading1">2. Назначение и условия применения</text:p>
      <text:p text:style-name="BodyText"/>
      <text:p text:style-name="Heading2">2.1 Назначение средства автоматизации</text:p>
      <text:p text:style-name="BodyText">«[Название ПО]» — это _______________________________________________________________________, который позволяет пользователю автоматизировать следующие виды деятельности:</text:p>
      <text:p text:style-name="ListItem">•  ______________________________________________________________________</text:p>
      <text:p text:style-name="ListItem">•  ______________________________________________________________________</text:p>
      <text:p text:style-name="ListItem">•  ______________________________________________________________________</text:p>
      <text:p text:style-name="BodyText"/>
      <text:p text:style-name="Heading2">2.2 Краткое описание возможностей</text:p>
      <text:p text:style-name="BodyText">Основные возможности средства автоматизации:</text:p>
      <text:p text:style-name="ListItem">•  ______________________________________________________________________</text:p>
      <text:p text:style-name="ListItem">•  ______________________________________________________________________</text:p>
      <text:p text:style-name="ListItem">•  ______________________________________________________________________</text:p>
      <text:p text:style-name="ListItem">•  ______________________________________________________________________</text:p>
      <text:p text:style-name="ListItem">•  поддержка операционных систем Linux и Windows</text:p>
      <text:p text:style-name="BodyText"/>
      <text:p text:style-name="Heading2">2.3 Конфигурация технических средств</text:p>
      <text:p text:style-name="BodyText">Linux (Ubuntu 22.04+):</text:p>
      <text:p text:style-name="ListItem">•  Процессор: не ниже 2-ядерного, 2 ГГц</text:p>
      <text:p text:style-name="ListItem">•  ОЗУ: не менее 4 ГБ (рекомендуется 8 ГБ)</text:p>
      <text:p text:style-name="ListItem">•  Свободное место на диске: не менее 1 ГБ</text:p>
      <text:p text:style-name="ListItem">•  ОС: Ubuntu 22.04 LTS или выше</text:p>
      <text:p text:style-name="ListItem">•  Зависимости: ________________________________________________</text:p>
      <text:p text:style-name="BodyText"/>
      <text:p text:style-name="BodyText">Windows 10+:</text:p>
      <text:p text:style-name="ListItem">•  Процессор: не ниже 2-ядерного, 2 ГГц</text:p>
      <text:p text:style-name="ListItem">•  ОЗУ: не менее 4 ГБ (рекомендуется 8 ГБ)</text:p>
      <text:p text:style-name="ListItem">•  Свободное место на диске: не менее 1 ГБ</text:p>
      <text:p text:style-name="ListItem">•  ОС: Windows 10 Pro 64-bit или выше</text:p>
      <text:p text:style-name="ListItem">•  Зависимости: ________________________________________________</text:p>
      <text:p text:style-name="BodyText"/>
      <text:p text:style-name="Heading2">2.4 Условия применения</text:p>
      <text:p text:style-name="BodyText">Программа применяется при наличии установленной операционной системы (Linux или Windows), соответствующей указанным выше требованиям. Для работы необходимо:</text:p>
      <text:p text:style-name="ListItem">•  подключение к локальной сети / интернету (для функций, требующих сетевого доступа)</text:p>
      <text:p text:style-name="ListItem">•  наличие учётной записи (для некоторых функций)</text:p>
      <text:p text:style-name="ListItem">•  ______________________________________________________________________</text:p>
      <text:p text:style-name="BodyText"/>
      <text:p text:style-name="Heading1">3. Подготовка к работе</text:p>
      <text:p text:style-name="BodyText"/>
      <text:p text:style-name="Heading2">3.1 Состав дистрибутива</text:p>
      <text:p text:style-name="BodyText">Дистрибутив включает:</text:p>
      <text:p text:style-name="ListItem">•  установочный файл / пакет (____________________________________)</text:p>
      <text:p text:style-name="ListItem">•  файлы конфигурации (при необходимости)</text:p>
      <text:p text:style-name="ListItem">•  документацию</text:p>
      <text:p text:style-name="BodyText"/>
      <text:p text:style-name="Heading2">3.2.1 Установка в Linux (Ubuntu)</text:p>
      <text:p text:style-name="BodyText">Способ 1 — установка из репозитория:</text:p>
      <text:p text:style-name="CodeBlock">    # Добавление репозитория (если требуется)</text:p>
      <text:p text:style-name="CodeBlock">    echo "deb [репозиторий]" | sudo tee /etc/apt/sources.list.d/[файл].list</text:p>
      <text:p text:style-name="CodeBlock">    # Импорт ключа GPG</text:p>
      <text:p text:style-name="CodeBlock">    wget -qO- [ключ] | sudo apt-key add -</text:p>
      <text:p text:style-name="CodeBlock">    # Установка</text:p>
      <text:p text:style-name="CodeBlock">    sudo apt update</text:p>
      <text:p text:style-name="CodeBlock">    sudo apt install [пакет]</text:p>
      <text:p text:style-name="BodyText">Способ 2 — установка из скачанного пакета:</text:p>
      <text:p text:style-name="CodeBlock">    # Для .deb</text:p>
      <text:p text:style-name="CodeBlock">    sudo dpkg -i [файл].deb</text:p>
      <text:p text:style-name="CodeBlock">    sudo apt --fix-broken install</text:p>
      <text:p text:style-name="CodeBlock"/>
      <text:p text:style-name="CodeBlock">    # Для .AppImage</text:p>
      <text:p text:style-name="CodeBlock">    chmod +x [файл].AppImage</text:p>
      <text:p text:style-name="CodeBlock">    ./[файл].AppImage</text:p>
      <text:p text:style-name="BodyText"/>
      <text:p text:style-name="Heading2">3.2.2 Установка в Windows</text:p>
      <text:p text:style-name="BodyText">Способ 1 — установка через установщик:</text:p>
      <text:p text:style-name="ListItem">1. Скачать установочный файл с официального сайта.</text:p>
      <text:p text:style-name="ListItem">2. Запустить [файл].exe / [файл].msi от имени администратора.</text:p>
      <text:p text:style-name="ListItem">3. Следовать инструкциям мастера установки.</text:p>
      <text:p text:style-name="BodyText">Способ 2 — установка через Chocolatey (при наличии):</text:p>
      <text:p text:style-name="CodeBlock">    choco install [пакет]</text:p>
      <text:p text:style-name="BodyText"/>
      <text:p text:style-name="Heading2">3.3 Проверка работоспособности</text:p>
      <text:p text:style-name="BodyText">После установки необходимо проверить, что программа запускается корректно.</text:p>
      <text:p text:style-name="BodyText">Linux:</text:p>
      <text:p text:style-name="CodeBlock">    # Проверка версии</text:p>
      <text:p text:style-name="CodeBlock">    [команда] --version</text:p>
      <text:p text:style-name="CodeBlock"/>
      <text:p text:style-name="CodeBlock">    # Запуск программы</text:p>
      <text:p text:style-name="CodeBlock">    [команда запуска]</text:p>
      <text:p text:style-name="BodyText">Windows:</text:p>
      <text:p text:style-name="CodeBlock">    :: Проверка версии</text:p>
      <text:p text:style-name="CodeBlock">    [команда] --version</text:p>
      <text:p text:style-name="CodeBlock"/>
      <text:p text:style-name="CodeBlock">    :: Запуск из командной строки</text:p>
      <text:p text:style-name="CodeBlock">    [команда запуска]</text:p>
      <text:p text:style-name="BodyText">Если программа запустилась и отображает основной интерфейс — установка выполнена успешно.</text:p>
      <text:p text:style-name="BodyText"/>
      <text:p text:style-name="Heading1">4. Описание операций</text:p>
      <text:p text:style-name="BodyText"/>
      <text:p text:style-name="Heading2">4.1 Общее описание</text:p>
      <text:p text:style-name="BodyText">В данном разделе приведены основные операции, выполняемые пользователем при работе со средством автоматизации «[Название ПО]».</text:p>
      <text:p text:style-name="BodyText"/>
      <text:p text:style-name="Heading2">4.2 Операция: [Название операции 1]</text:p>
      <text:p text:style-name="BodyText"/>
      <text:p text:style-name="BodyText"><text:span text:style-name="BoldSpan">Наименование:</text:span></text:p>
      <text:p text:style-name="BodyText">[Название операции 1]</text:p>
      <text:p text:style-name="BodyText"/>
      <text:p text:style-name="BodyText"><text:span text:style-name="BoldSpan">Условия выполнения:</text:span></text:p>
      <text:p text:style-name="ListItem">•  программа должна быть установлена и запущена</text:p>
      <text:p text:style-name="ListItem">•  ________________________________________</text:p>
      <text:p text:style-name="BodyText"/>
      <text:p text:style-name="BodyText"><text:span text:style-name="BoldSpan">Подготовительные действия:</text:span></text:p>
      <text:p text:style-name="ListItem">1. Запустить программу.</text:p>
      <text:p text:style-name="ListItem">2. __________________________________</text:p>
      <text:p text:style-name="BodyText"/>
      <text:p text:style-name="BodyText"><text:span text:style-name="BoldSpan">Основные действия:</text:span></text:p>
      <text:p text:style-name="ListItem">1. В главном меню выбрать «_____________».</text:p>
      <text:p text:style-name="ListItem">2. В открывшемся окне указать параметры.</text:p>
      <text:p text:style-name="ListItem">3. Нажать кнопку «______________________».</text:p>
      <text:p text:style-name="ListItem">4. Дождаться завершения операции.</text:p>
      <text:p text:style-name="BodyText"/>
      <text:p text:style-name="BodyText"><text:span text:style-name="BoldSpan">Заключительные действия:</text:span></text:p>
      <text:p text:style-name="ListItem">•  Убедиться, что результат корректен.</text:p>
      <text:p text:style-name="ListItem">•  При необходимости сохранить результат.</text:p>
      <text:p text:style-name="BodyText"/>
      <text:p text:style-name="BodyText"><text:span text:style-name="BoldSpan">Ресурсы, расходуемые на операцию:</text:span></text:p>
      <text:p text:style-name="ListItem">•  время выполнения: __________________</text:p>
      <text:p text:style-name="ListItem">•  оперативная память: ________________</text:p>
      <text:p text:style-name="ListItem">•  дисковое пространство: ______________</text:p>
      <text:p text:style-name="BodyText"/>
      <text:p text:style-name="Heading2">4.3 Операция: [Название операции 2]</text:p>
      <text:p text:style-name="BodyText"/>
      <text:p text:style-name="BodyText"><text:span text:style-name="BoldSpan">Наименование:</text:span></text:p>
      <text:p text:style-name="BodyText">[Название операции 2]</text:p>
      <text:p text:style-name="BodyText"/>
      <text:p text:style-name="BodyText"><text:span text:style-name="BoldSpan">Условия выполнения:</text:span></text:p>
      <text:p text:style-name="ListItem">•  программа должна быть установлена и запущена</text:p>
      <text:p text:style-name="ListItem">•  ________________________________________</text:p>
      <text:p text:style-name="BodyText"/>
      <text:p text:style-name="BodyText"><text:span text:style-name="BoldSpan">Подготовительные действия:</text:span></text:p>
      <text:p text:style-name="ListItem">1. Запустить программу.</text:p>
      <text:p text:style-name="ListItem">2. __________________________________</text:p>
      <text:p text:style-name="BodyText"/>
      <text:p text:style-name="BodyText"><text:span text:style-name="BoldSpan">Основные действия:</text:span></text:p>
      <text:p text:style-name="ListItem">1. В главном меню выбрать «_____________».</text:p>
      <text:p text:style-name="ListItem">2. В открывшемся окне указать параметры.</text:p>
      <text:p text:style-name="ListItem">3. Нажать кнопку «______________________».</text:p>
      <text:p text:style-name="ListItem">4. Дождаться завершения операции.</text:p>
      <text:p text:style-name="BodyText"/>
      <text:p text:style-name="BodyText"><text:span text:style-name="BoldSpan">Заключительные действия:</text:span></text:p>
      <text:p text:style-name="ListItem">•  Убедиться, что результат корректен.</text:p>
      <text:p text:style-name="ListItem">•  При необходимости сохранить результат.</text:p>
      <text:p text:style-name="BodyText"/>
      <text:p text:style-name="BodyText"><text:span text:style-name="BoldSpan">Ресурсы, расходуемые на операцию:</text:span></text:p>
      <text:p text:style-name="ListItem">•  время выполнения: __________________</text:p>
      <text:p text:style-name="ListItem">•  оперативная память: ________________</text:p>
      <text:p text:style-name="ListItem">•  дисковое пространство: ______________</text:p>
      <text:p text:style-name="BodyText"/>
      <text:p text:style-name="Heading2">4.4 [Дополнительные операции — при необходимости]</text:p>
      <text:p text:style-name="BodyText">При необходимости в данный раздел добавляются другие операции, предусмотренные функциональностью средства автоматизации.</text:p>
      <text:p text:style-name="BodyText"/>
      <text:p text:style-name="Heading1">5. Аварийные ситуации</text:p>
      <text:p text:style-name="BodyText"/>
      <text:p text:style-name="Heading2">5.1 Действия при сбоях выполнения операций</text:p>
      <text:p text:style-name="BodyText">При возникновении ошибки в процессе выполнения операции необходимо:</text:p>
      <text:p text:style-name="ListItem">1. Зафиксировать текст сообщения об ошибке.</text:p>
      <text:p text:style-name="ListItem">2. Проверить сетевое подключение (если требуется).</text:p>
      <text:p text:style-name="ListItem">3. Убедиться, что сервер (если требуется) доступен и работает.</text:p>
      <text:p text:style-name="BodyText">Linux: проверить системные журналы</text:p>
      <text:p text:style-name="CodeBlock">    journalctl -xe</text:p>
      <text:p text:style-name="CodeBlock">    tail -f /var/log/syslog</text:p>
      <text:p text:style-name="BodyText">Windows: проверить Журнал событий</text:p>
      <text:p text:style-name="CodeBlock">    eventvwr.msc</text:p>
      <text:p text:style-name="BodyText"/>
      <text:p text:style-name="Heading2">5.2 Восстановление программ и/или данных</text:p>
      <text:p text:style-name="BodyText">При отказе носителей данных или обнаружении ошибок в данных:</text:p>
      <text:p text:style-name="ListItem">1. Закрыть программу.</text:p>
      <text:p text:style-name="ListItem">2. Создать резервную копию рабочей директории:</text:p>
      <text:p text:style-name="ListItem">•  Linux: cp -r ~/.config/[программа] ~/backup/</text:p>
      <text:p text:style-name="ListItem">•  Windows: копировать папку %APPDATA%\[программа] в резервную папку</text:p>
      <text:p text:style-name="ListItem">3. Переустановить программу (см. раздел 3.2).</text:p>
      <text:p text:style-name="ListItem">4. Восстановить данные из резервной копии.</text:p>
      <text:p text:style-name="BodyText"/>
      <text:p text:style-name="Heading2">5.3 Действия при несанкционированном доступе</text:p>
      <text:p text:style-name="BodyText">При обнаружении признаков несанкционированного доступа:</text:p>
      <text:p text:style-name="ListItem">1. Немедленно завершить работу программы.</text:p>
      <text:p text:style-name="ListItem">2. Сменить пароль учётной записи.</text:p>
      <text:p text:style-name="ListItem">3. Проверить журнал доступа (логи).</text:p>
      <text:p text:style-name="ListItem">4. Сообщить администратору системы.</text:p>
      <text:p text:style-name="BodyText"/>
      <text:p text:style-name="Heading2">5.4 Действия в других аварийных ситуациях</text:p>
      <text:p text:style-name="BodyText">При зависании программы:</text:p>
      <text:p text:style-name="BodyText">Linux:</text:p>
      <text:p text:style-name="CodeBlock">    # Найти PID процесса</text:p>
      <text:p text:style-name="CodeBlock">    ps aux | grep [программа]</text:p>
      <text:p text:style-name="CodeBlock">    # Принудительно завершить</text:p>
      <text:p text:style-name="CodeBlock">    kill -9 [PID]</text:p>
      <text:p text:style-name="BodyText">Windows:</text:p>
      <text:p text:style-name="CodeBlock">    :: Завершить через диспетчер задач</text:p>
      <text:p text:style-name="CodeBlock">    taskkill /f /im [процесс].exe</text:p>
      <text:p text:style-name="BodyText"/>
      <text:p text:style-name="Heading1">6. Рекомендации по освоению</text:p>
      <text:p text:style-name="BodyText"/>
      <text:p text:style-name="Heading2">6.1 Контрольный пример</text:p>
      <text:p text:style-name="BodyText">Для освоения работы со средством автоматизации рекомендуется выполнить следующий контрольный пример.</text:p>
      <text:p text:style-name="BodyText">Цель: проверить основные функции программы.</text:p>
      <text:p text:style-name="BodyText">Исходные данные:</text:p>
      <text:p text:style-name="ListItem">•  ________________________________________</text:p>
      <text:p text:style-name="ListItem">•  ________________________________________</text:p>
      <text:p text:style-name="BodyText"/>
      <text:p text:style-name="Heading2">6.2 Порядок выполнения контрольного примера</text:p>
      <text:p text:style-name="ListItem">1. Установить программу (см. раздел 3.2).</text:p>
      <text:p text:style-name="ListItem">2. Запустить программу (см. раздел 3.3).</text:p>
      <text:p text:style-name="ListItem">3. Выполнить операцию 4.2 с параметрами: ___________________</text:p>
      <text:p text:style-name="ListItem">4. Проверить, что получен ожидаемый результат: ______________</text:p>
      <text:p text:style-name="ListItem">5. Выполнить операцию 4.3 с параметрами: ___________________</text:p>
      <text:p text:style-name="ListItem">6. Проверить, что получен ожидаемый результат: ______________</text:p>
      <text:p text:style-name="ListItem">7. Сохранить результаты работы.</text:p>
      <text:p text:style-name="BodyText"/>
      <text:p text:style-name="BodyText"><text:span text:style-name="BoldSpan">Признаки успешного выполнения:</text:span></text:p>
      <text:p text:style-name="ListItem">•  программа работает без ошибок</text:p>
      <text:p text:style-name="ListItem">•  все операции завершаются корректно</text:p>
      <text:p text:style-name="ListItem">•  результаты операций соответствуют ожидаемым</text:p>
      <text:p text:style-name="BodyText"/>
      <text:p text:style-name="BodyText"/>
      <text:p text:style-name="Heading1">Лист регистрации изменений</text:p>
      <text:p text:style-name="BodyText"/>
      <table:table>
        <table:table-column/>
        <table:table-column/>
        <table:table-column/>
        <table:table-column/>
        <table:table-row>
          <table:table-cell>
            <text:p>Версия</text:p>
          </table:table-cell>
          <table:table-cell>
            <text:p>Дата</text:p>
          </table:table-cell>
          <table:table-cell>
            <text:p>Изменение</text:p>
          </table:table-cell>
          <table:table-cell>
            <text:p>Исполнитель</text:p>
          </table:table-cell>
        </table:table-row>
        <table:table-row>
          <table:table-cell>
            <text:p>1.0</text:p>
          </table:table-cell>
          <table:table-cell>
            <text:p>[дата]</text:p>
          </table:table-cell>
          <table:table-cell>
            <text:p>Первоначальная версия</text:p>
          </table:table-cell>
          <table:table-cell>
            <text:p>[ФИО]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BodyText" style:family="paragraph" style:display-name="BodyText">
      <style:paragraph-properties fo:line-height="150%"/>
      <style:text-properties fo:font-size="14pt" style:font-name="Times New Roman" fo:language="ru" fo:country="RU"/>
    </style:style>
  </office:styles>
  <office:automatic-styles>
    <style:page-layout style:name="GostPage">
      <style:page-layout-properties fo:page-width="210mm" fo:page-height="297mm" fo:margin-left="30mm" fo:margin-right="10mm" fo:margin-top="20mm" fo:margin-bottom="20mm"/>
    </style:page-layout>
  </office:automatic-styles>
  <office:master-styles>
    <style:master-page style:name="Standard" style:page-layout-name="GostPage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