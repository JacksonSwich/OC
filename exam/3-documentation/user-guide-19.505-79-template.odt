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itleMain" style:family="paragraph" style:display-name="TitleMain">
      <style:paragraph-properties fo:text-align="center"/>
      <style:text-properties fo:font-size="16pt" style:font-name="Times New Roman" fo:font-weight="bold"/>
    </style:style>
    <style:style style:name="Heading1" style:family="paragraph" style:parent-style-name="Heading" style:display-name="Heading1">
      <style:paragraph-properties fo:text-align="left"/>
      <style:text-properties fo:font-size="14pt" style:font-name="Times New Roman" fo:font-weight="bold"/>
    </style:style>
    <style:style style:name="Heading2" style:family="paragraph" style:parent-style-name="Heading" style:display-name="Heading2">
      <style:paragraph-properties fo:text-align="left"/>
      <style:text-properties fo:font-size="14pt" style:font-name="Times New Roman" fo:font-weight="bold" fo:font-style="italic"/>
    </style:style>
    <style:style style:name="Heading3" style:family="paragraph" style:parent-style-name="Heading" style:display-name="Heading3">
      <style:paragraph-properties fo:text-align="left"/>
      <style:text-properties fo:font-size="14pt" style:font-name="Times New Roman" fo:font-weight="bold"/>
    </style:style>
    <style:style style:name="CodeBlock" style:family="paragraph" style:display-name="CodeBlock">
      <style:paragraph-properties fo:margin-left="10mm"/>
      <style:text-properties fo:font-size="11pt" style:font-name="Courier New"/>
    </style:style>
    <style:style style:name="ListItem" style:family="paragraph" style:display-name="ListItem">
      <style:paragraph-properties fo:margin-left="10mm"/>
      <style:text-properties fo:font-size="14pt" style:font-name="Times New Roman"/>
    </style:style>
    <style:style style:name="BoldSpan" style:family="text" style:display-name="BoldSpan">
      <style:text-properties fo:font-weight="bold"/>
    </style:style>
  </office:automatic-styles>
  <office:body>
    <office:text>
      <text:p text:style-name="BodyText"/>
      <text:p text:style-name="BodyText"/>
      <text:p text:style-name="BodyText"/>
      <text:p text:style-name="BodyText"/>
      <text:p text:style-name="BodyText"/>
      <text:p text:style-name="TitleMain">РУКОВОДСТВО ОПЕРАТОРА</text:p>
      <text:p text:style-name="BodyText"/>
      <text:p text:style-name="BodyText"/>
      <text:p text:style-name="BodyText"/>
      <text:p text:style-name="BodyText"/>
      <text:p text:style-name="BodyText"/>
      <text:p text:style-name="TitleMain"><text:span text:style-name="BoldSpan">Программа: Пример ПО</text:span></text:p>
      <text:p text:style-name="BodyText"/>
      <text:p text:style-name="BodyText">Операционная система: Linux (Ubuntu 22.04+) / Windows 10+</text:p>
      <text:p text:style-name="BodyText">Дата составления: _______________</text:p>
      <text:p text:style-name="BodyText"/>
      <text:p text:style-name="BodyText"/>
      <text:p text:style-name="BodyText"/>
      <text:p text:style-name="Heading1">1. Назначение программы</text:p>
      <text:p text:style-name="BodyText"/>
      <text:p text:style-name="Heading2">1.1 Назначение средства автоматизации</text:p>
      <text:p text:style-name="BodyText">«Пример ПО» — это _______________________________________________________________________, предназначенный для __________________________________________________________________.</text:p>
      <text:p text:style-name="BodyText">Программа обеспечивает выполнение следующих основных функций: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BodyText"/>
      <text:p text:style-name="Heading2">1.2 Краткое описание возможностей</text:p>
      <text:p text:style-name="BodyText">Основные возможности программы: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поддержка операционных систем Linux и Windows</text:p>
      <text:p text:style-name="BodyText"/>
      <text:p text:style-name="Heading2">1.3 Сведения, достаточные для понимания функций программы</text:p>
      <text:p text:style-name="BodyText">Для понимания функций программы пользователь должен обладать базовыми навыками работы в операционной системе (терминал Linux / командная строка Windows), а также понимать основные принципы ________________________________________</text:p>
      <text:p text:style-name="BodyText">Программа работает в следующих режимах:</text:p>
      <text:p text:style-name="ListItem">•  интерактивный режим — пользователь взаимодействует через графический интерфейс или командную строку</text:p>
      <text:p text:style-name="ListItem">•  пакетный режим (при наличии) — автоматическое выполнение набора операций без участия оператора</text:p>
      <text:p text:style-name="BodyText"/>
      <text:p text:style-name="Heading1">2. Условия выполнения программы</text:p>
      <text:p text:style-name="BodyText"/>
      <text:p text:style-name="Heading2">2.1 Требования к техническим средствам</text:p>
      <text:p text:style-name="BodyText">Linux (Ubuntu 22.04+):</text:p>
      <text:p text:style-name="ListItem">•  Процессор: не ниже 2-ядерного, 2 ГГц</text:p>
      <text:p text:style-name="ListItem">•  ОЗУ: не менее 4 ГБ (рекомендуется 8 ГБ)</text:p>
      <text:p text:style-name="ListItem">•  Свободное место на диске: не менее 1 ГБ</text:p>
      <text:p text:style-name="ListItem">•  ОС: Ubuntu 22.04 LTS или выше</text:p>
      <text:p text:style-name="ListItem">•  Периферийные устройства: клавиатура, мышь, монитор 1024×768</text:p>
      <text:p text:style-name="ListItem">•  Зависимости: ________________________________________________</text:p>
      <text:p text:style-name="BodyText"/>
      <text:p text:style-name="BodyText">Windows 10+:</text:p>
      <text:p text:style-name="ListItem">•  Процессор: не ниже 2-ядерного, 2 ГГц</text:p>
      <text:p text:style-name="ListItem">•  ОЗУ: не менее 4 ГБ (рекомендуется 8 ГБ)</text:p>
      <text:p text:style-name="ListItem">•  Свободное место на диске: не менее 1 ГБ</text:p>
      <text:p text:style-name="ListItem">•  ОС: Windows 10 Pro 64-bit или выше</text:p>
      <text:p text:style-name="ListItem">•  Периферийные устройства: клавиатура, мышь, монитор 1024×768</text:p>
      <text:p text:style-name="ListItem">•  Зависимости: ________________________________________________</text:p>
      <text:p text:style-name="BodyText"/>
      <text:p text:style-name="Heading2">2.2 Требования к программным средствам</text:p>
      <text:p text:style-name="BodyText">Минимальный состав программного окружения:</text:p>
      <text:p text:style-name="ListItem">•  Операционная система согласно п. 2.1</text:p>
      <text:p text:style-name="ListItem">•  Среда выполнения: ___________________________________________</text:p>
      <text:p text:style-name="ListItem">•  Дополнительные компоненты:</text:p>
      <text:p text:style-name="ListItem">•  ________________________________________</text:p>
      <text:p text:style-name="ListItem">•  ________________________________________</text:p>
      <text:p text:style-name="ListItem">•  Наличие подключения к локальной сети / интернету (для функций, требующих сетевого доступа)</text:p>
      <text:p text:style-name="BodyText"/>
      <text:p text:style-name="BodyText">Рекомендуемое программное обеспечение:</text:p>
      <text:p text:style-name="ListItem">•  ________________________________________</text:p>
      <text:p text:style-name="ListItem">•  ________________________________________</text:p>
      <text:p text:style-name="BodyText"/>
      <text:p text:style-name="Heading2">2.3 Требования к подготовке оператора</text:p>
      <text:p text:style-name="BodyText">Пользователь (оператор) должен:</text:p>
      <text:p text:style-name="ListItem">•  иметь базовые навыки работы в операционной системе (Linux / Windows)</text:p>
      <text:p text:style-name="ListItem">•  понимать основные принципы ________________________________</text:p>
      <text:p text:style-name="ListItem">•  пройти инструктаж по работе с программой (ознакомиться с настоящим руководством)</text:p>
      <text:p text:style-name="BodyText"/>
      <text:p text:style-name="Heading1">3. Выполнение программы</text:p>
      <text:p text:style-name="BodyText"/>
      <text:p text:style-name="Heading2">3.1 Загрузка программы</text:p>
      <text:p text:style-name="BodyText">3.1.1 Установка в Linux (Ubuntu)</text:p>
      <text:p text:style-name="CodeBlock">    # Способ 1 — из репозитория</text:p>
      <text:p text:style-name="CodeBlock">    echo "deb [репозиторий]" | sudo tee /etc/apt/sources.list.d/[файл].list</text:p>
      <text:p text:style-name="CodeBlock">    wget -qO- [ключ] | sudo apt-key add -</text:p>
      <text:p text:style-name="CodeBlock">    sudo apt update</text:p>
      <text:p text:style-name="CodeBlock">    sudo apt install [пакет]</text:p>
      <text:p text:style-name="CodeBlock"/>
      <text:p text:style-name="CodeBlock">    # Способ 2 — из .deb пакета</text:p>
      <text:p text:style-name="CodeBlock">    sudo dpkg -i [файл].deb</text:p>
      <text:p text:style-name="CodeBlock">    sudo apt --fix-broken install</text:p>
      <text:p text:style-name="BodyText"/>
      <text:p text:style-name="BodyText">3.1.2 Установка в Windows</text:p>
      <text:p text:style-name="ListItem">1. Скачать установочный файл с официального сайта.</text:p>
      <text:p text:style-name="ListItem">2. Запустить [файл].exe / [файл].msi от имени администратора.</text:p>
      <text:p text:style-name="ListItem">3. Следовать инструкциям мастера установки.</text:p>
      <text:p text:style-name="BodyText"/>
      <text:p text:style-name="BodyText">3.1.3 Проверка загрузки (установки)</text:p>
      <text:p text:style-name="BodyText">Linux:</text:p>
      <text:p text:style-name="CodeBlock">    [команда] --version</text:p>
      <text:p text:style-name="CodeBlock">    [команда запуска]</text:p>
      <text:p text:style-name="BodyText">Windows:</text:p>
      <text:p text:style-name="CodeBlock">    [команда] --version</text:p>
      <text:p text:style-name="CodeBlock">    [команда запуска]</text:p>
      <text:p text:style-name="BodyText">Если программа запустилась и отображает основной интерфейс — установка выполнена успешно.</text:p>
      <text:p text:style-name="BodyText"/>
      <text:p text:style-name="Heading2">3.2 Запуск программы</text:p>
      <text:p text:style-name="BodyText">Linux:</text:p>
      <text:p text:style-name="ListItem">•  Из терминала: [команда запуска]</text:p>
      <text:p text:style-name="ListItem">•  Из графического меню: «Приложения» → [категория] → «Пример ПО»</text:p>
      <text:p text:style-name="BodyText"/>
      <text:p text:style-name="BodyText">Windows:</text:p>
      <text:p text:style-name="ListItem">•  Из командной строки: [команда запуска]</text:p>
      <text:p text:style-name="ListItem">•  Из меню «Пуск»: [категория] → «Пример ПО»</text:p>
      <text:p text:style-name="BodyText"/>
      <text:p text:style-name="BodyText">При запуске программа отображает главное окно (интерфейс), готовое к выполнению операций.</text:p>
      <text:p text:style-name="BodyText"/>
      <text:p text:style-name="Heading2">3.3 Взаимодействие оператора с программой</text:p>
      <text:p text:style-name="BodyText"/>
      <text:p text:style-name="Heading3">3.3.1 Описание команд и форматов</text:p>
      <text:p text:style-name="BodyText">Управление программой осуществляется с помощью графического интерфейса (пункты меню, кнопки, поля ввода), а также командной строки (если применимо):</text:p>
      <text:p text:style-name="BodyText"/>
      <table:table>
        <table:table-column/>
        <table:table-column/>
        <table:table-column/>
        <table:table-row>
          <table:table-cell>
            <text:p>Команда / действие</text:p>
          </table:table-cell>
          <table:table-cell>
            <text:p>Назначение</text:p>
          </table:table-cell>
          <table:table-cell>
            <text:p>Формат</text:p>
          </table:table-cell>
        </table:table-row>
        <table:table-row>
          <table:table-cell>
            <text:p>[команда 1]</text:p>
          </table:table-cell>
          <table:table-cell>
            <text:p>[назначение]</text:p>
          </table:table-cell>
          <table:table-cell>
            <text:p>[формат]</text:p>
          </table:table-cell>
        </table:table-row>
        <table:table-row>
          <table:table-cell>
            <text:p>[команда 2]</text:p>
          </table:table-cell>
          <table:table-cell>
            <text:p>[назначение]</text:p>
          </table:table-cell>
          <table:table-cell>
            <text:p>[формат]</text:p>
          </table:table-cell>
        </table:table-row>
        <table:table-row>
          <table:table-cell>
            <text:p>[команда 3]</text:p>
          </table:table-cell>
          <table:table-cell>
            <text:p>[назначение]</text:p>
          </table:table-cell>
          <table:table-cell>
            <text:p>[формат]</text:p>
          </table:table-cell>
        </table:table-row>
      </table:table>
      <text:p text:style-name="BodyText"/>
      <text:p text:style-name="Heading3">3.3.2 Операция: [Название операции 1]</text:p>
      <text:p text:style-name="BodyText"/>
      <text:p text:style-name="BodyText"><text:span text:style-name="BoldSpan">Наименование:</text:span></text:p>
      <text:p text:style-name="BodyText">[Название операции 1]</text:p>
      <text:p text:style-name="BodyText"/>
      <text:p text:style-name="BodyText"><text:span text:style-name="BoldSpan">Условия выполнения:</text:span></text:p>
      <text:p text:style-name="ListItem">•  программа должна быть установлена и запущена (см. п. 3.1, 3.2)</text:p>
      <text:p text:style-name="ListItem">•  ________________________________________</text:p>
      <text:p text:style-name="BodyText"/>
      <text:p text:style-name="BodyText"><text:span text:style-name="BoldSpan">Подготовительные действия:</text:span></text:p>
      <text:p text:style-name="ListItem">1. Запустить программу (см. п. 3.2).</text:p>
      <text:p text:style-name="ListItem">2. __________________________________</text:p>
      <text:p text:style-name="BodyText"/>
      <text:p text:style-name="BodyText"><text:span text:style-name="BoldSpan">Основные действия:</text:span></text:p>
      <text:p text:style-name="ListItem">1. В главном меню выбрать «_____________».</text:p>
      <text:p text:style-name="ListItem">2. В открывшемся окне указать параметры.</text:p>
      <text:p text:style-name="ListItem">3. Нажать кнопку «______________________».</text:p>
      <text:p text:style-name="ListItem">4. Дождаться завершения операции.</text:p>
      <text:p text:style-name="BodyText"/>
      <text:p text:style-name="BodyText"><text:span text:style-name="BoldSpan">Заключительные действия:</text:span></text:p>
      <text:p text:style-name="ListItem">•  Убедиться, что результат корректен.</text:p>
      <text:p text:style-name="ListItem">•  При необходимости сохранить результат.</text:p>
      <text:p text:style-name="BodyText"/>
      <text:p text:style-name="BodyText"><text:span text:style-name="BoldSpan">Ресурсы, расходуемые на операцию:</text:span></text:p>
      <text:p text:style-name="ListItem">•  время выполнения: __________________</text:p>
      <text:p text:style-name="ListItem">•  оперативная память: ________________</text:p>
      <text:p text:style-name="ListItem">•  дисковое пространство: ______________</text:p>
      <text:p text:style-name="BodyText"/>
      <text:p text:style-name="BodyText"><text:span text:style-name="BoldSpan">Ответ программы на команды:</text:span></text:p>
      <text:p text:style-name="ListItem">•  при успешном выполнении: ________________________________</text:p>
      <text:p text:style-name="ListItem">•  при ошибке: ______________________________________________</text:p>
      <text:p text:style-name="BodyText"/>
      <text:p text:style-name="Heading3">3.3.3 Операция: [Название операции 2]</text:p>
      <text:p text:style-name="BodyText"/>
      <text:p text:style-name="BodyText"><text:span text:style-name="BoldSpan">Наименование:</text:span></text:p>
      <text:p text:style-name="BodyText">[Название операции 2]</text:p>
      <text:p text:style-name="BodyText"/>
      <text:p text:style-name="BodyText"><text:span text:style-name="BoldSpan">Условия выполнения:</text:span></text:p>
      <text:p text:style-name="ListItem">•  программа должна быть установлена и запущена (см. п. 3.1, 3.2)</text:p>
      <text:p text:style-name="ListItem">•  ________________________________________</text:p>
      <text:p text:style-name="BodyText"/>
      <text:p text:style-name="BodyText"><text:span text:style-name="BoldSpan">Подготовительные действия:</text:span></text:p>
      <text:p text:style-name="ListItem">1. Запустить программу (см. п. 3.2).</text:p>
      <text:p text:style-name="ListItem">2. __________________________________</text:p>
      <text:p text:style-name="BodyText"/>
      <text:p text:style-name="BodyText"><text:span text:style-name="BoldSpan">Основные действия:</text:span></text:p>
      <text:p text:style-name="ListItem">1. В главном меню выбрать «_____________».</text:p>
      <text:p text:style-name="ListItem">2. В открывшемся окне указать параметры.</text:p>
      <text:p text:style-name="ListItem">3. Нажать кнопку «______________________».</text:p>
      <text:p text:style-name="ListItem">4. Дождаться завершения операции.</text:p>
      <text:p text:style-name="BodyText"/>
      <text:p text:style-name="BodyText"><text:span text:style-name="BoldSpan">Заключительные действия:</text:span></text:p>
      <text:p text:style-name="ListItem">•  Убедиться, что результат корректен.</text:p>
      <text:p text:style-name="ListItem">•  При необходимости сохранить результат.</text:p>
      <text:p text:style-name="BodyText"/>
      <text:p text:style-name="BodyText"><text:span text:style-name="BoldSpan">Ресурсы, расходуемые на операцию:</text:span></text:p>
      <text:p text:style-name="ListItem">•  время выполнения: __________________</text:p>
      <text:p text:style-name="ListItem">•  оперативная память: ________________</text:p>
      <text:p text:style-name="ListItem">•  дисковое пространство: ______________</text:p>
      <text:p text:style-name="BodyText"/>
      <text:p text:style-name="BodyText"><text:span text:style-name="BoldSpan">Ответ программы на команды:</text:span></text:p>
      <text:p text:style-name="ListItem">•  при успешном выполнении: ________________________________</text:p>
      <text:p text:style-name="ListItem">•  при ошибке: ______________________________________________</text:p>
      <text:p text:style-name="BodyText"/>
      <text:p text:style-name="Heading3">3.3.4 [Дополнительные операции — при необходимости]</text:p>
      <text:p text:style-name="BodyText">При необходимости в данный раздел добавляются другие операции, предусмотренные функциональностью программы.</text:p>
      <text:p text:style-name="BodyText"/>
      <text:p text:style-name="Heading2">3.4 Завершение программы</text:p>
      <text:p text:style-name="BodyText">Нормальное завершение:</text:p>
      <text:p text:style-name="BodyText">Linux:</text:p>
      <text:p text:style-name="ListItem">•  Нажать кнопку «Закрыть» в главном окне программы</text:p>
      <text:p text:style-name="ListItem">•  или нажать Ctrl+Q (Ctrl+C в терминале)</text:p>
      <text:p text:style-name="ListItem">•  или выполнить: [команда] --exit</text:p>
      <text:p text:style-name="BodyText"/>
      <text:p text:style-name="BodyText">Windows:</text:p>
      <text:p text:style-name="ListItem">•  Нажать кнопку «Закрыть» в правом верхнем углу окна</text:p>
      <text:p text:style-name="ListItem">•  или нажать Alt+F4</text:p>
      <text:p text:style-name="ListItem">•  или выполнить: [команда] --exit</text:p>
      <text:p text:style-name="BodyText"/>
      <text:p text:style-name="Heading1">4. Сообщения оператору</text:p>
      <text:p text:style-name="BodyText"/>
      <text:p text:style-name="Heading2">4.1 Информационные сообщения</text:p>
      <text:p text:style-name="BodyText">В процессе выполнения программы оператору могут выдаваться следующие информационные сообщения:</text:p>
      <text:p text:style-name="BodyText"/>
      <table:table>
        <table:table-column/>
        <table:table-column/>
        <table:table-column/>
        <table:table-row>
          <table:table-cell>
            <text:p>Сообщение</text:p>
          </table:table-cell>
          <table:table-cell>
            <text:p>Описание содержания</text:p>
          </table:table-cell>
          <table:table-cell>
            <text:p>Действия оператора</text:p>
          </table:table-cell>
        </table:table-row>
        <table:table-row>
          <table:table-cell>
            <text:p>[текст сообщения 1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  <table:table-row>
          <table:table-cell>
            <text:p>[текст сообщения 2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  <table:table-row>
          <table:table-cell>
            <text:p>[текст сообщения 3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</table:table>
      <text:p text:style-name="BodyText"/>
      <text:p text:style-name="Heading2">4.2 Сообщения об ошибках</text:p>
      <text:p text:style-name="BodyText">При возникновении ошибок программа выдаёт следующие сообщения:</text:p>
      <text:p text:style-name="BodyText"/>
      <table:table>
        <table:table-column/>
        <table:table-column/>
        <table:table-column/>
        <table:table-row>
          <table:table-cell>
            <text:p>Сообщение</text:p>
          </table:table-cell>
          <table:table-cell>
            <text:p>Описание содержания</text:p>
          </table:table-cell>
          <table:table-cell>
            <text:p>Действия оператора</text:p>
          </table:table-cell>
        </table:table-row>
        <table:table-row>
          <table:table-cell>
            <text:p>[текст ошибки 1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  <table:table-row>
          <table:table-cell>
            <text:p>[текст ошибки 2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  <table:table-row>
          <table:table-cell>
            <text:p>[текст ошибки 3]</text:p>
          </table:table-cell>
          <table:table-cell>
            <text:p>[описание]</text:p>
          </table:table-cell>
          <table:table-cell>
            <text:p>[действия]</text:p>
          </table:table-cell>
        </table:table-row>
      </table:table>
      <text:p text:style-name="BodyText"/>
      <text:p text:style-name="Heading2">4.3 Действия оператора при сбоях</text:p>
      <text:p text:style-name="BodyText">При возникновении сбоя в процессе выполнения программы необходимо:</text:p>
      <text:p text:style-name="ListItem">1. Зафиксировать текст сообщения об ошибке.</text:p>
      <text:p text:style-name="ListItem">2. Проверить сетевое подключение (если требуется).</text:p>
      <text:p text:style-name="ListItem">3. Убедиться, что сервер (если требуется) доступен и работает.</text:p>
      <text:p text:style-name="BodyText">Проверка системных журналов:</text:p>
      <text:p text:style-name="ListItem">•  Linux: journalctl -xe или tail -f /var/log/syslog</text:p>
      <text:p text:style-name="ListItem">•  Windows: eventvwr.msc (Журнал событий)</text:p>
      <text:p text:style-name="BodyText"/>
      <text:p text:style-name="Heading2">4.4 Восстановление программы после сбоя</text:p>
      <text:p text:style-name="BodyText">После устранения причины сбоя необходимо:</text:p>
      <text:p text:style-name="ListItem">1. Закрыть программу (см. п. 3.4).</text:p>
      <text:p text:style-name="ListItem">2. Проверить целостность данных:</text:p>
      <text:p text:style-name="ListItem">•  Linux: cp -r ~/.config/[программа] ~/backup/</text:p>
      <text:p text:style-name="ListItem">•  Windows: копировать папку %APPDATA%\[программа] в резервную папку</text:p>
      <text:p text:style-name="ListItem">3. Запустить программу повторно (см. п. 3.2).</text:p>
      <text:p text:style-name="ListItem">4. Если программа не запускается — переустановить её (см. п. 3.1).</text:p>
      <text:p text:style-name="ListItem">5. Восстановить данные из резервной копии.</text:p>
      <text:p text:style-name="BodyText"/>
      <text:p text:style-name="Heading2">4.5 Возможность повторного запуска программы</text:p>
      <text:p text:style-name="BodyText">После устранения сбоя программа может быть запущена повторно в обычном режиме (см. п. 3.2). Если сбой был вызван ошибками в данных, необходимо восстановить данные из резервной копии перед запуском.</text:p>
      <text:p text:style-name="BodyText"/>
      <text:p text:style-name="BodyText">При обнаружении признаков несанкционированного доступа:</text:p>
      <text:p text:style-name="ListItem">1. Немедленно завершить работу программы.</text:p>
      <text:p text:style-name="ListItem">2. Сменить пароль учётной записи.</text:p>
      <text:p text:style-name="ListItem">3. Проверить журнал доступа (логи).</text:p>
      <text:p text:style-name="ListItem">4. Сообщить администратору системы.</text:p>
      <text:p text:style-name="BodyText"/>
      <text:p text:style-name="BodyText"/>
      <text:p text:style-name="Heading1">Приложение А. Лист регистрации изменений</text:p>
      <text:p text:style-name="BodyText"/>
      <table:table>
        <table:table-column/>
        <table:table-column/>
        <table:table-column/>
        <table:table-column/>
        <table:table-row>
          <table:table-cell>
            <text:p>Версия</text:p>
          </table:table-cell>
          <table:table-cell>
            <text:p>Дата</text:p>
          </table:table-cell>
          <table:table-cell>
            <text:p>Изменение</text:p>
          </table:table-cell>
          <table:table-cell>
            <text:p>Исполнитель</text:p>
          </table:table-cell>
        </table:table-row>
        <table:table-row>
          <table:table-cell>
            <text:p>1.0</text:p>
          </table:table-cell>
          <table:table-cell>
            <text:p>[дата]</text:p>
          </table:table-cell>
          <table:table-cell>
            <text:p>Первоначальная версия</text:p>
          </table:table-cell>
          <table:table-cell>
            <text:p>[ФИО]</text:p>
          </table:table-cell>
        </table:table-row>
      </table:table>
      <text:p text:style-name="BodyText"/>
      <text:p text:style-name="BodyText"/>
      <text:p text:style-name="Heading1">Приложение Б. Дополнительные материалы</text:p>
      <text:p text:style-name="BodyText">[При необходимости: дополнительные сведения, которые нецелесообразно включать в основные разделы руководства — схемы, графики, подробные примеры, справочные данные.]</text:p>
      <text:p text:style-name="BodyText"/>
      <text:p text:style-name="BodyText"/>
      <text:p text:style-name="BodyText"/>
      <text:p text:style-name="BodyText">Документ составлен в соответствии с требованиями ГОСТ 19.505-79 «ЕСПД. Руководство оператора. Требования к содержанию и оформлению»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dyText" style:family="paragraph" style:display-name="BodyText">
      <style:paragraph-properties fo:line-height="150%"/>
      <style:text-properties fo:font-size="14pt" style:font-name="Times New Roman" fo:language="ru" fo:country="RU"/>
    </style:style>
  </office:styles>
  <office:automatic-styles>
    <style:page-layout style:name="GostPage">
      <style:page-layout-properties fo:page-width="210mm" fo:page-height="297mm" fo:margin-left="30mm" fo:margin-right="10mm" fo:margin-top="20mm" fo:margin-bottom="20mm"/>
    </style:page-layout>
  </office:automatic-styles>
  <office:master-styles>
    <style:master-page style:name="Standard" style:page-layout-name="GostPage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